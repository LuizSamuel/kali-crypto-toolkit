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9ECFDE1B.png" manifest:media-type="image/png"/>
  <manifest:file-entry manifest:full-path="Pictures/10000001000001CA00000071ED4EDA33.png" manifest:media-type="image/png"/>
  <manifest:file-entry manifest:full-path="Pictures/1000000000000780000004385242A0D3.png" manifest:media-type="image/png"/>
  <manifest:file-entry manifest:full-path="Pictures/1000000000000780000004382EB494A9.png" manifest:media-type="image/png"/>
  <manifest:file-entry manifest:full-path="Pictures/1000000000000780000004388550AED0.png" manifest:media-type="image/png"/>
  <manifest:file-entry manifest:full-path="Pictures/100000000000078000000438E6AB4113.png" manifest:media-type="image/png"/>
  <manifest:file-entry manifest:full-path="Pictures/100000000000078000000438AAF9BFBB.png" manifest:media-type="image/png"/>
  <manifest:file-entry manifest:full-path="Pictures/100000000000078000000438922C0574.png" manifest:media-type="image/png"/>
  <manifest:file-entry manifest:full-path="Pictures/1000000000000780000004385C793164.png" manifest:media-type="image/png"/>
  <manifest:file-entry manifest:full-path="Pictures/1000000000000780000004381AEDFCFF.png" manifest:media-type="image/png"/>
  <manifest:file-entry manifest:full-path="Pictures/1000000000000780000004387DAA6C31.png" manifest:media-type="image/png"/>
  <manifest:file-entry manifest:full-path="Pictures/100000000000078000000438EFBCE59D.png" manifest:media-type="image/png"/>
  <manifest:file-entry manifest:full-path="Pictures/10000000000007800000043852CF29A9.png" manifest:media-type="image/png"/>
  <manifest:file-entry manifest:full-path="Pictures/1000000000000780000004384D3A85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fo:color="#242424" loext:opacity="100%" style:font-name="Times New Roman1" fo:font-size="12pt" fo:letter-spacing="-0.0008in" fo:font-weight="bold" officeooo:paragraph-rsid="00189820" fo:background-color="#ffffff" style:font-size-asian="12pt" style:font-weight-asian="bold" style:font-name-complex="Times New Roman2" style:font-size-complex="12pt"/>
    </style:style>
    <style:style style:name="P2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officeooo:paragraph-rsid="00189820"/>
    </style:style>
    <style:style style:name="P3" style:family="paragraph" style:parent-style-name="Heading_20_1">
      <style:paragraph-properties fo:margin-top="0in" fo:margin-bottom="0in" style:contextual-spacing="false" fo:line-height="200%" fo:text-align="center" style:justify-single-word="false"/>
      <style:text-properties officeooo:paragraph-rsid="00189820"/>
    </style:style>
    <style:style style:name="P4" style:family="paragraph" style:parent-style-name="Text_20_body">
      <style:paragraph-properties fo:margin-top="0in" fo:margin-bottom="0in" style:contextual-spacing="false" fo:line-height="200%" fo:text-align="left" style:justify-single-word="false"/>
      <style:text-properties fo:color="#242424" loext:opacity="100%" style:font-name="Times New Roman1" fo:font-size="12pt" fo:letter-spacing="-0.0008in" fo:font-weight="bold" officeooo:paragraph-rsid="00189820" fo:background-color="#ffffff" style:font-size-asian="12pt" style:font-weight-asian="bold" style:font-name-complex="Times New Roman2" style:font-size-complex="12pt"/>
    </style:style>
    <style:style style:name="P5" style:family="paragraph" style:parent-style-name="Text_20_body" style:list-style-name="L1">
      <style:paragraph-properties fo:margin-left="0in" fo:margin-right="0in" fo:margin-top="0in" fo:margin-bottom="0.0835in" style:contextual-spacing="false" fo:line-height="200%" fo:text-align="left" style:justify-single-word="false" fo:orphans="2" fo:widows="2" fo:text-indent="0in" style:auto-text-indent="false" fo:padding="0in" fo:border="none"/>
      <style:text-properties fo:color="#242424" loext:opacity="100%" style:font-name="Times New Roman1" fo:letter-spacing="-0.0008in" fo:font-weight="bold" fo:background-color="#ffffff" style:font-size-asian="12pt" style:font-weight-asian="bold" style:font-name-complex="Times New Roman2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line-height="200%" fo:text-align="lef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#ffffff" style:font-size-asian="12pt" style:font-weight-asian="bold" style:font-name-complex="Times New Roman2"/>
    </style:style>
    <style:style style:name="P7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Times New Roman1" fo:font-size="12pt" fo:letter-spacing="-0.0008in" fo:font-weight="bold" officeooo:paragraph-rsid="00189820" fo:background-color="#ffffff" style:font-size-asian="12pt" style:font-weight-asian="bold" style:font-name-complex="Times New Roman2" style:font-size-complex="12pt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in" fo:margin-bottom="0in" style:contextual-spacing="false"/>
      <style:text-properties fo:color="#000000" loext:opacity="100%" fo:font-weight="bold" style:font-weight-asian="bold" style:font-weight-complex="bold"/>
    </style:style>
    <style:style style:name="P11" style:family="paragraph" style:parent-style-name="Heading_20_2">
      <style:text-properties fo:font-size="12pt" officeooo:paragraph-rsid="00225abb" style:font-size-asian="12pt" style:font-size-complex="12pt"/>
    </style:style>
    <style:style style:name="P12" style:family="paragraph" style:parent-style-name="Standard">
      <style:paragraph-properties fo:margin-top="0in" fo:margin-bottom="0in" style:contextual-spacing="false" fo:line-height="200%" fo:text-align="left" style:justify-single-word="false"/>
      <style:text-properties fo:color="#000000" loext:opacity="100%" style:font-name="Times New Roman1" fo:font-size="12pt" fo:letter-spacing="-0.0008in" fo:font-weight="bold" officeooo:rsid="0019a35d" officeooo:paragraph-rsid="0019a35d" fo:background-color="#ffffff" style:font-size-asian="12pt" style:font-weight-asian="bold" style:font-name-complex="Times New Roman2" style:font-size-complex="12pt"/>
    </style:style>
    <style:style style:name="P13" style:family="paragraph" style:parent-style-name="Text_20_body">
      <style:text-properties fo:font-size="12pt" officeooo:paragraph-rsid="00225abb" style:font-size-asian="12pt" style:font-size-complex="12pt"/>
    </style:style>
    <style:style style:name="P14" style:family="paragraph" style:parent-style-name="Heading_20_2">
      <style:text-properties fo:font-size="12pt" style:font-size-asian="12pt" style:font-size-complex="12pt"/>
    </style:style>
    <style:style style:name="P15" style:family="paragraph" style:parent-style-name="Heading_20_1">
      <style:text-properties fo:color="#000000" loext:opacity="100%" fo:font-weight="bold" style:font-weight-asian="bold"/>
    </style:style>
    <style:style style:name="P16" style:family="paragraph" style:parent-style-name="Heading_20_2">
      <style:text-properties fo:font-variant="normal" fo:text-transform="none" fo:color="#000000" loext:opacity="100%" style:font-name="Times New Roman" fo:font-size="12pt" fo:letter-spacing="normal" fo:font-style="normal" officeooo:rsid="001b6049" officeooo:paragraph-rsid="00225abb" fo:background-color="#ffffff" style:font-size-asian="12pt" style:font-name-complex="Times New Roman2" style:font-size-complex="12pt"/>
    </style:style>
    <style:style style:name="P17" style:family="paragraph" style:parent-style-name="Heading_20_2">
      <style:text-properties officeooo:paragraph-rsid="00225abb"/>
    </style:style>
    <style:style style:name="P18" style:family="paragraph" style:parent-style-name="Standard">
      <style:paragraph-properties fo:margin-top="0in" fo:margin-bottom="0in" style:contextual-spacing="false" fo:line-height="200%" fo:text-align="left" style:justify-single-word="false"/>
      <style:text-properties officeooo:paragraph-rsid="001b6049"/>
    </style:style>
    <style:style style:name="P19" style:family="paragraph" style:parent-style-name="Standard">
      <style:paragraph-properties fo:margin-top="0in" fo:margin-bottom="0in" style:contextual-spacing="false" fo:line-height="200%" fo:text-align="left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rsid="001b6049" officeooo:paragraph-rsid="001b6049" fo:background-color="#ffffff" style:font-size-asian="12pt" style:font-weight-asian="bold" style:font-name-complex="Times New Roman2" style:font-size-complex="12pt" style:font-weight-complex="bold"/>
    </style:style>
    <style:style style:name="P20" style:family="paragraph" style:parent-style-name="Heading_20_1">
      <style:text-properties fo:color="#000000" loext:opacity="100%" fo:font-weight="bold" style:font-weight-asian="bold" style:font-weight-complex="bold"/>
    </style:style>
    <style:style style:name="P21" style:family="paragraph" style:parent-style-name="Heading_20_2">
      <style:text-properties fo:font-size="12pt" officeooo:paragraph-rsid="0020700b" style:font-size-asian="12pt" style:font-size-complex="12pt"/>
    </style:style>
    <style:style style:name="P22" style:family="paragraph" style:parent-style-name="Standard">
      <style:paragraph-properties fo:margin-top="0in" fo:margin-bottom="0in" style:contextual-spacing="false" fo:line-height="200%" fo:text-align="left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rsid="0020700b" officeooo:paragraph-rsid="0020700b" fo:background-color="#ffffff" style:font-size-asian="12pt" style:font-weight-asian="bold" style:font-name-complex="Times New Roman2" style:font-size-complex="12pt" style:font-weight-complex="bold"/>
    </style:style>
    <style:style style:name="T1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2" style:family="text">
      <style:text-properties fo:color="#242424" loext:opacity="100%" style:font-name="Times New Roman1" fo:font-size="12pt" fo:letter-spacing="-0.0008in" fo:font-weight="bold" fo:background-color="#ffffff" loext:char-shading-value="0" style:font-size-asian="12pt" style:font-weight-asian="bold" style:font-name-complex="Times New Roman2" style:font-size-complex="12pt"/>
    </style:style>
    <style:style style:name="T3" style:family="text">
      <style:text-properties style:font-name="Times New Roman1" fo:font-size="12pt" fo:font-weight="bold" officeooo:rsid="00189820" style:font-name-asian="Times New Roman2" style:font-size-asian="12pt" style:font-weight-asian="bold" style:font-name-complex="Times New Roman2" style:font-size-complex="12pt" style:font-weight-complex="bold"/>
    </style:style>
    <style:style style:name="T4" style:family="text">
      <style:text-properties fo:color="#242424" loext:opacity="100%" style:font-name="Times New Roman1" fo:font-size="12pt" fo:letter-spacing="-0.0008in" fo:font-style="normal" fo:font-weight="bold" fo:background-color="#ffffff" loext:char-shading-value="0" style:font-size-asian="12pt" style:font-style-asian="normal" style:font-weight-asian="bold" style:font-name-complex="Times New Roman2" style:font-size-complex="12pt" style:font-style-complex="normal"/>
    </style:style>
    <style:style style:name="T5" style:family="text">
      <style:text-properties style:font-name="Times New Roman1" fo:font-size="12pt" fo:font-style="normal" fo:font-weight="bold" style:font-size-asian="12pt" style:font-style-asian="normal" style:font-weight-asian="bold" style:font-name-complex="Times New Roman2" style:font-size-complex="12pt"/>
    </style:style>
    <style:style style:name="T6" style:family="text">
      <style:text-properties fo:color="#242424" loext:opacity="100%" style:font-name="Times New Roman1" fo:font-size="12pt" fo:letter-spacing="-0.0008in" fo:font-style="normal" fo:font-weight="bold" officeooo:rsid="001f43d7" fo:background-color="#ffffff" loext:char-shading-value="0" style:font-size-asian="12pt" style:font-style-asian="normal" style:font-weight-asian="bold" style:font-name-complex="Times New Roman2" style:font-size-complex="12pt" style:font-style-complex="normal"/>
    </style:style>
    <style:style style:name="T7" style:family="text">
      <style:text-properties style:font-name="Times New Roman1" fo:font-size="12pt" fo:font-style="normal" fo:font-weight="bold" officeooo:rsid="001f43d7" style:font-size-asian="12pt" style:font-style-asian="normal" style:font-weight-asian="bold" style:font-name-complex="Times New Roman2" style:font-size-complex="12pt"/>
    </style:style>
    <style:style style:name="T8" style:family="text">
      <style:text-properties fo:color="#242424" loext:opacity="100%" style:font-name="Times New Roman1" fo:font-size="12pt" fo:letter-spacing="-0.0008in" fo:font-weight="bold" officeooo:rsid="00189820" fo:background-color="#ffffff" loext:char-shading-value="0" style:font-size-asian="12pt" style:font-weight-asian="bold" style:font-name-complex="Times New Roman2" style:font-size-complex="12pt"/>
    </style:style>
    <style:style style:name="T9" style:family="text">
      <style:text-properties fo:font-variant="normal" fo:text-transform="none" fo:color="#000000" loext:opacity="100%" style:font-name="quote-cjk-patch" fo:letter-spacing="normal" fo:font-style="normal" fo:font-weight="bold" officeooo:rsid="00189820"/>
    </style:style>
    <style:style style:name="T10" style:family="text">
      <style:text-properties fo:font-variant="normal" fo:text-transform="none" fo:color="#000000" loext:opacity="100%" style:font-name="quote-cjk-patch" fo:letter-spacing="normal" fo:font-style="normal" fo:font-weight="bold"/>
    </style:style>
    <style:style style:name="T11" style:family="text">
      <style:text-properties fo:font-variant="normal" fo:text-transform="none" fo:color="#000000" loext:opacity="100%" style:font-name="quote-cjk-patch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quote-cjk-patch" fo:font-size="12pt" fo:letter-spacing="normal" fo:font-style="normal" fo:font-weight="bold"/>
    </style:style>
    <style:style style:name="T13" style:family="text">
      <style:text-properties fo:font-style="normal" style:font-style-asian="normal"/>
    </style:style>
    <style:style style:name="T14" style:family="text">
      <style:text-properties fo:font-style="normal"/>
    </style:style>
    <style:style style:name="T15" style:family="text">
      <style:text-properties officeooo:rsid="001c73aa"/>
    </style:style>
    <style:style style:name="T16" style:family="text">
      <style:text-properties officeooo:rsid="001d3578"/>
    </style:style>
    <style:style style:name="T17" style:family="text">
      <style:text-properties officeooo:rsid="001a48aa"/>
    </style:style>
    <style:style style:name="T18" style:family="text">
      <style:text-properties style:font-weight-complex="bold"/>
    </style:style>
    <style:style style:name="T19" style:family="text">
      <style:text-properties officeooo:rsid="001b6049"/>
    </style:style>
    <style:style style:name="T20" style:family="text">
      <style:text-properties fo:font-variant="normal" fo:text-transform="none" fo:color="#000000" loext:opacity="100%" style:font-name="Times New Roman" fo:font-size="12pt" fo:letter-spacing="normal" fo:font-style="normal" officeooo:rsid="001b6049" fo:background-color="#ffffff" loext:char-shading-value="0" style:font-size-asian="12pt" style:font-name-complex="Times New Roman2" style:font-size-complex="12pt"/>
    </style:style>
    <style:style style:name="T21" style:family="text">
      <style:text-properties fo:font-variant="normal" fo:text-transform="none" fo:color="#000000" loext:opacity="100%" style:font-name="Times New Roman" fo:font-size="12pt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nline_20_Heading">
      <style:graphic-properties style:vertical-pos="middle" style:vertical-rel="text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2827in" svg:y="-0.0709in" svg:width="6.3602in" svg:height="1.5689in" draw:z-index="0"><draw:image xlink:href="Pictures/10000001000001CA00000071ED4EDA33.png" xlink:type="simple" xlink:show="embed" xlink:actuate="onLoad" draw:mime-type="image/png"/></draw:frame></text:p>
      <text:p text:style-name="P1" loext:marker-style-name="T1"/>
      <text:p text:style-name="P2" loext:marker-style-name="T1"><text:span text:style-name="T2">UNIT TITLE: </text:span><text:span text:style-name="T1">ADVANCED </text:span><text:span text:style-name="T3">CRYPTOGRAPHY</text:span></text:p>
      <text:p text:style-name="P2" loext:marker-style-name="T4"><text:span text:style-name="Subtle_20_Emphasis"><text:span text:style-name="T5">STUDENT NAME: </text:span></text:span><text:span text:style-name="Subtle_20_Emphasis"><text:span text:style-name="T6">Gakere Samuel</text:span></text:span></text:p>
      <text:h text:style-name="P3" text:outline-level="1" loext:marker-style-name="T5"><text:bookmark-start text:name="_Toc231548464"/><text:bookmark-start text:name="__RefHeading___Toc1223_2026174545"/><text:span text:style-name="Subtle_20_Emphasis"><text:span text:style-name="T5">ADMISSION NUMBER: BSCCS/2024/</text:span></text:span><text:bookmark-end text:name="_Toc231548464"/><text:span text:style-name="Subtle_20_Emphasis"><text:span text:style-name="T7">55278</text:span></text:span><text:bookmark-end text:name="__RefHeading___Toc1223_2026174545"/></text:h>
      <text:h text:style-name="P3" text:outline-level="1" loext:marker-style-name="T5"><text:bookmark-start text:name="_Toc231548465"/><text:bookmark-start text:name="__RefHeading___Toc1225_2026174545"/><text:span text:style-name="Subtle_20_Emphasis"><text:span text:style-name="T5">COURSE: B.S.C COMPUTER SCIENCE</text:span></text:span><text:bookmark-end text:name="_Toc231548465"/><text:bookmark-end text:name="__RefHeading___Toc1225_2026174545"/></text:h>
      <text:p text:style-name="P2" loext:marker-style-name="T2"><text:span text:style-name="T2">LECTURE: MR NYORO MICHAEL</text:span></text:p>
      <text:p text:style-name="P2" loext:marker-style-name="T2"><text:span text:style-name="T2">SUBMISSION DATE: 6/</text:span><text:span text:style-name="T8">8</text:span><text:span text:style-name="T2">/2026</text:span></text:p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4" loext:marker-style-name="T2"><text:soft-page-break/><text:span text:style-name="Strong_20_Emphasis"><text:span text:style-name="T9">P</text:span></text:span><text:span text:style-name="Strong_20_Emphasis"><text:span text:style-name="T10">roject Title:</text:span></text:span><text:span text:style-name="T11"> Hybrid Secure Messaging &amp; File Vault with Digital Signatures</text:span></text:p>
      <text:list text:style-name="L1">
        <text:list-item>
          <text:p text:style-name="P5"><text:span text:style-name="Strong_20_Emphasis"><text:span text:style-name="T12">Selected Technologies:</text:span></text:span></text:p>
          <text:list>
            <text:list-item>
              <text:p text:style-name="P6">Python 3.11 + Cryptography Library (Fernet, RSA, SHA-256)</text:p>
            </text:list-item>
            <text:list-item>
              <text:p text:style-name="P6">SQLite (Local key &amp; user storage)</text:p>
            </text:list-item>
            <text:list-item>
              <text:p text:style-name="P6">OpenSSL 3.0 (Certificate generation)</text:p>
            </text:list-item>
          </text:list>
        </text:list-item>
      </text:list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8"><text:a xlink:type="simple" xlink:href="#__RefHeading___Toc1223_2026174545" office:name="ADMISSION NUMBER: BSCCS/2024/55278" text:style-name="Index_20_Link" text:visited-style-name="Index_20_Link"><text:span text:style-name="T13">ADMISSION NUMBER: BSCCS/2024/</text:span><text:span text:style-name="T13">55278</text:span><text:tab/>1</text:a></text:p>
          <text:p text:style-name="P8"><text:a xlink:type="simple" xlink:href="#__RefHeading___Toc1225_2026174545" office:name="COURSE: B.S.C COMPUTER SCIENCE" text:style-name="Index_20_Link" text:visited-style-name="Index_20_Link"><text:span text:style-name="T13">COURSE: B.S.C COMPUTER SCIENCE</text:span><text:tab/>1</text:a></text:p>
          <text:p text:style-name="P8"><text:a xlink:type="simple" xlink:href="#__RefHeading___Toc1227_2026174545" text:style-name="Index_20_Link" text:visited-style-name="Index_20_Link"><text:tab/>4</text:a></text:p>
          <text:p text:style-name="P8"><text:a xlink:type="simple" xlink:href="#__RefHeading___Toc1221_2026174545" office:name="Week 1: Creation of The Virtual Enviroment &amp; Required Tools Installation" text:style-name="Index_20_Link" text:visited-style-name="Index_20_Link">Week 1: Creation of The Virtual Enviroment &amp; Required Tools Installation<text:tab/>4</text:a></text:p>
          <text:p text:style-name="P9"><text:a xlink:type="simple" xlink:href="#__RefHeading___Toc1229_2026174545" office:name="Fig 1.1: Openssl version" text:style-name="Index_20_Link" text:visited-style-name="Index_20_Link">Fig 1.1: Openssl version<text:tab/>4</text:a></text:p>
          <text:p text:style-name="P9"><text:a xlink:type="simple" xlink:href="#__RefHeading___Toc1231_2026174545" office:name="Fig 1.2: Virtual environment creation" text:style-name="Index_20_Link" text:visited-style-name="Index_20_Link">Fig 1.2: Virtual environment creation<text:tab/>4</text:a></text:p>
          <text:p text:style-name="P9"><text:a xlink:type="simple" xlink:href="#__RefHeading___Toc1233_2026174545" office:name="Fig 1.3: Activating environment (notice prompt change)" text:style-name="Index_20_Link" text:visited-style-name="Index_20_Link">Fig 1.3: Activating environment (notice prompt change)<text:tab/>5</text:a></text:p>
          <text:p text:style-name="P9"><text:a xlink:type="simple" xlink:href="#__RefHeading___Toc1235_2026174545" office:name="Fig 1.4: Successful pip install" text:style-name="Index_20_Link" text:visited-style-name="Index_20_Link">Fig 1.4: Successful pip install<text:tab/>5</text:a></text:p>
          <text:p text:style-name="P9"><text:a xlink:type="simple" xlink:href="#__RefHeading___Toc1237_2026174545" office:name="Fig 1.5: Complete environment test script" text:style-name="Index_20_Link" text:visited-style-name="Index_20_Link">Fig 1.5: Complete environment test script<text:tab/>6</text:a></text:p>
          <text:p text:style-name="P8"><text:a xlink:type="simple" xlink:href="#__RefHeading___Toc1239_2026174545" office:name="Week 2: Classical Cryptography and Cipher Design" text:style-name="Index_20_Link" text:visited-style-name="Index_20_Link">Week 2: Classical Cryptography and Cipher Design<text:tab/>6</text:a></text:p>
          <text:p text:style-name="P9"><text:a xlink:type="simple" xlink:href="#__RefHeading___Toc1241_2026174545" office:name="Fig 2.1: Caesar Cipher implementation showing encryption of &quot;CRYPTOGRAPHY&quot;" text:style-name="Index_20_Link" text:visited-style-name="Index_20_Link">Fig 2.1: Caesar Cipher implementation showing encryption of "CRYPTOGRAPHY"<text:tab/>6</text:a></text:p>
          <text:p text:style-name="P9"><text:a xlink:type="simple" xlink:href="#__RefHeading___Toc1243_2026174545" office:name="Fig 2.2: Vigenère (&quot;KALI&quot;), Caesar Brute Force (Shift 3), and Input Validation" text:style-name="Index_20_Link" text:visited-style-name="Index_20_Link"><text:span text:style-name="T14">Fig 2.2: </text:span><text:span text:style-name="T14">Vigenère ("KALI"), Caesar Brute Force (Shift 3), and Input Validation</text:span><text:tab/>7</text:a></text:p>
          <text:p text:style-name="P9"><text:a xlink:type="simple" xlink:href="#__RefHeading___Toc1245_2026174545" office:name="Fig 2.3: Cipher testing results and security analysis identifying weaknesses" text:style-name="Index_20_Link" text:visited-style-name="Index_20_Link"><text:span text:style-name="T14">Fig 2.</text:span><text:span text:style-name="T14">3</text:span><text:span text:style-name="T14">: </text:span><text:span text:style-name="T14">Cipher testing results and security analysis identifying weaknesses</text:span><text:tab/>7</text:a></text:p>
          <text:p text:style-name="P8"><text:a xlink:type="simple" xlink:href="#__RefHeading___Toc1247_2026174545" office:name="Week 3: Stream Ciphers and Randomness Testing" text:style-name="Index_20_Link" text:visited-style-name="Index_20_Link">Week 3: Stream Ciphers and Randomness Testing<text:tab/>9</text:a></text:p>
          <text:p text:style-name="P9"><text:a xlink:type="simple" xlink:href="#__RefHeading___Toc1249_2026174545" office:name="Fig 3: LFSR Implementation, RC4 Stream Cipher, and Performance Results" text:style-name="Index_20_Link" text:visited-style-name="Index_20_Link">Fig 3: LFSR Implementation, RC4 Stream Cipher, and Performance Results<text:tab/>9</text:a></text:p>
          <text:p text:style-name="P8"><text:a xlink:type="simple" xlink:href="#__RefHeading___Toc1219_2026174545" office:name="Week 4: AES Block Cipher" text:style-name="Index_20_Link" text:visited-style-name="Index_20_Link">Week 4: AES Block Cipher<text:tab/>9</text:a></text:p>
          <text:p text:style-name="P9"><text:a xlink:type="simple" xlink:href="#__RefHeading___Toc1251_2026174545" office:name="Fig 4: AES-256-CBC Key Generation, Encryption/Decryption, Performance Test, and Security Features" text:style-name="Index_20_Link" text:visited-style-name="Index_20_Link">Fig 4: AES-256-CBC Key Generation, Encryption/Decryption, Performance Test, and Security Features<text:tab/>9</text:a></text:p>
          <text:p text:style-name="P8"><text:a xlink:type="simple" xlink:href="#__RefHeading___Toc1253_2026174545" office:name="Week 5: RSA Public Key Cryptography" text:style-name="Index_20_Link" text:visited-style-name="Index_20_Link">Week 5: RSA Public Key Cryptography<text:tab/>10</text:a></text:p>
          <text:p text:style-name="P9"><text:a xlink:type="simple" xlink:href="#__RefHeading___Toc1255_2026174545" office:name="Fig 5: RSA-2048 Key Pair Generation, Public Key Encryption, Private Key Decryption, and Security Comparison" text:style-name="Index_20_Link" text:visited-style-name="Index_20_Link">Fig 5: RSA-2048 Key Pair Generation, Public Key Encryption, Private Key Decryption, and Security Comparison<text:tab/>10</text:a></text:p>
          <text:p text:style-name="P8"><text:a xlink:type="simple" xlink:href="#__RefHeading___Toc1257_2026174545" office:name="Week 6: Hashing and Password Security" text:style-name="Index_20_Link" text:visited-style-name="Index_20_Link">Week 6: Hashing and Password Security<text:tab/>10</text:a></text:p>
          <text:p text:style-name="P9"><text:a xlink:type="simple" xlink:href="#__RefHeading___Toc1259_2026174545" office:name="Fig 6: SHA-256 Hash Generation, PBKDF2 Password Hashing with Salt, Login Authentication, and Security Analysis" text:style-name="Index_20_Link" text:visited-style-name="Index_20_Link">Fig 6: SHA-256 Hash Generation, PBKDF2 Password Hashing with Salt, Login Authentication, and Security Analysis<text:tab/>10</text:a></text:p>
          <text:p text:style-name="P8"><text:a xlink:type="simple" xlink:href="#__RefHeading___Toc1261_2026174545" office:name="Creativity" text:style-name="Index_20_Link" text:visited-style-name="Index_20_Link">Creativity<text:tab/>11</text:a></text:p>
        </text:index-body>
      </text:table-of-content>
      <text:p text:style-name="P7" loext:marker-style-name="T2"/>
      <text:p text:style-name="P7" loext:marker-style-name="T2"/>
      <text:h text:style-name="Heading_20_1" text:outline-level="1"><text:bookmark-start text:name="__RefHeading___Toc1227_2026174545"/><text:soft-page-break/><draw:frame draw:style-name="fr2" draw:name="Frame2" text:anchor-type="as-char" draw:z-index="15"><draw:text-box fo:min-height="0in" fo:min-width="0in"><text:h text:style-name="P10" text:outline-level="1"><text:bookmark-start text:name="__RefHeading___Toc1221_2026174545"/>Week <text:span text:style-name="T15">1</text:span>: <text:span text:style-name="T16">Creation <text:s/>of <text:s/>The Virtual Enviroment &amp; Required Tools Installation</text:span><text:bookmark-end text:name="__RefHeading___Toc1221_2026174545"/></text:h></draw:text-box></draw:frame><text:s/><text:bookmark-end text:name="__RefHeading___Toc1227_2026174545"/></text:h>
      <text:h text:style-name="P11" text:outline-level="2"><text:bookmark-start text:name="__RefHeading___Toc1229_2026174545"/><draw:frame draw:style-name="fr1" draw:name="Image2" text:anchor-type="char" svg:x="0in" svg:y="0.4547in" svg:width="6.9252in" svg:height="3.8953in" draw:z-index="1"><draw:image xlink:href="Pictures/1000000000000780000004385242A0D3.png" xlink:type="simple" xlink:show="embed" xlink:actuate="onLoad" draw:mime-type="image/png"/></draw:frame>Fig 1.1: Openssl version<text:bookmark-end text:name="__RefHeading___Toc1229_2026174545"/></text:h>
      <text:p text:style-name="P12" loext:marker-style-name="T2"/>
      <text:h text:style-name="P11" text:outline-level="2" text:is-list-header="true"><text:bookmark-start text:name="__RefHeading___Toc1231_2026174545"/>Fig 1.2: Virtual environment creation<text:bookmark-end text:name="__RefHeading___Toc1231_2026174545"/></text:h>
      <text:h text:style-name="P11" text:outline-level="2" text:is-list-header="true"><draw:frame draw:style-name="fr1" draw:name="Image3" text:anchor-type="char" svg:x="-0.2563in" svg:y="0.172in" svg:width="6.9252in" svg:height="2.0744in" draw:z-index="2"><draw:image xlink:href="Pictures/1000000000000780000004381AEDFCFF.png" xlink:type="simple" xlink:show="embed" xlink:actuate="onLoad" draw:mime-type="image/png"/></draw:frame></text:h>
      <text:p text:style-name="P13"/>
      <text:h text:style-name="P14" text:outline-level="2" text:is-list-header="true"/>
      <text:p text:style-name="P12" loext:marker-style-name="T2"/>
      <text:h text:style-name="P11" text:outline-level="2"><text:bookmark-start text:name="__RefHeading___Toc1233_2026174545"/><text:soft-page-break/>Fig 1.3: Activating environment (notice prompt change)<text:bookmark-end text:name="__RefHeading___Toc1233_2026174545"/></text:h>
      <text:h text:style-name="P11" text:outline-level="2" text:is-list-header="true"><text:bookmark-start text:name="__RefHeading___Toc1235_2026174545"/><draw:frame draw:style-name="fr1" draw:name="Image4" text:anchor-type="char" svg:x="0in" svg:y="0.089in" svg:width="6.9252in" svg:height="3.8953in" draw:z-index="3"><draw:image xlink:href="Pictures/1000000000000780000004382EB494A9.png" xlink:type="simple" xlink:show="embed" xlink:actuate="onLoad" draw:mime-type="image/png"/></draw:frame>Fig 1.4: Successful pip install<text:bookmark-end text:name="__RefHeading___Toc1235_2026174545"/></text:h>
      <text:h text:style-name="P11" text:outline-level="2"><draw:frame draw:style-name="fr1" draw:name="Image5" text:anchor-type="char" svg:x="-0.0209in" svg:y="0.0917in" svg:width="6.9252in" svg:height="3.1693in" draw:z-index="4"><draw:image xlink:href="Pictures/1000000000000780000004388550AED0.png" xlink:type="simple" xlink:show="embed" xlink:actuate="onLoad" draw:mime-type="image/png"/></draw:frame></text:h>
      <text:h text:style-name="P14" text:outline-level="2"/>
      <text:h text:style-name="P11" text:outline-level="2"/>
      <text:h text:style-name="P11" text:outline-level="2"/>
      <text:h text:style-name="P11" text:outline-level="2"><text:bookmark-start text:name="__RefHeading___Toc1237_2026174545"/><text:soft-page-break/><text:span text:style-name="T17">Fig 1.5: </text:span>Complete environment test script<text:bookmark-end text:name="__RefHeading___Toc1237_2026174545"/></text:h>
      <text:h text:style-name="P14" text:outline-level="2"/>
      <text:h text:style-name="P15" text:outline-level="1"><text:bookmark-start text:name="__RefHeading___Toc1239_2026174545"/><draw:frame draw:style-name="fr1" draw:name="Image6" text:anchor-type="char" svg:x="0in" svg:y="-0.1417in" svg:width="6.9252in" svg:height="3.8953in" draw:z-index="5"><draw:image xlink:href="Pictures/100000000000078000000438E6AB4113.png" xlink:type="simple" xlink:show="embed" xlink:actuate="onLoad" draw:mime-type="image/png"/></draw:frame><text:span text:style-name="T18">Week 2: Classical Cryptography and Cipher Design</text:span><text:bookmark-end text:name="__RefHeading___Toc1239_2026174545"/></text:h>
      <text:h text:style-name="P11" text:outline-level="2"><text:bookmark-start text:name="__RefHeading___Toc1241_2026174545"/><draw:frame draw:style-name="fr1" draw:name="Image7" text:anchor-type="char" svg:x="-0.0646in" svg:y="0.3555in" svg:width="6.9252in" svg:height="3.2827in" draw:z-index="6"><draw:image xlink:href="Pictures/100000000000078000000438922C0574.png" xlink:type="simple" xlink:show="embed" xlink:actuate="onLoad" draw:mime-type="image/png"/></draw:frame><text:span text:style-name="T19">Fig 2.1: </text:span>Caesar Cipher implementation showing encryption of "CRYPTOGRAPHY"<text:bookmark-end text:name="__RefHeading___Toc1241_2026174545"/></text:h>
      <text:h text:style-name="P16" text:outline-level="2"/>
      <text:h text:style-name="P16" text:outline-level="2"><text:soft-page-break/></text:h>
      <text:h text:style-name="P16" text:outline-level="2"/>
      <text:h text:style-name="P17" text:outline-level="2"><text:bookmark-start text:name="__RefHeading___Toc1243_2026174545"/><text:span text:style-name="T20">Fig 2.2: </text:span><text:span text:style-name="T21">Vigenère ("KALI"), Caesar Brute Force (Shift 3), and Input Validation</text:span><text:bookmark-end text:name="__RefHeading___Toc1243_2026174545"/></text:h>
      <text:p text:style-name="P18" loext:marker-style-name="T2"><draw:frame draw:style-name="fr1" draw:name="Image8" text:anchor-type="char" svg:x="0in" svg:y="0.252in" svg:width="6.9252in" svg:height="3.8953in" draw:z-index="7"><draw:image xlink:href="Pictures/1000000000000780000004385C793164.png" xlink:type="simple" xlink:show="embed" xlink:actuate="onLoad" draw:mime-type="image/png"/></draw:frame></text:p>
      <text:h text:style-name="Heading_20_2" text:outline-level="2"><text:bookmark-start text:name="__RefHeading___Toc1245_2026174545"/><text:span text:style-name="T20">Fig 2.</text:span><text:span text:style-name="T20">3</text:span><text:span text:style-name="T20">: </text:span><text:span text:style-name="T20">Cipher testing results and security analysis identifying weaknesses</text:span><text:bookmark-end text:name="__RefHeading___Toc1245_2026174545"/></text:h>
      <text:p text:style-name="P19" loext:marker-style-name="T2"><draw:frame draw:style-name="fr1" draw:name="Image9" text:anchor-type="char" svg:x="0.0209in" svg:y="0.0398in" svg:width="6.9252in" svg:height="3.8953in" draw:z-index="8"><draw:image xlink:href="Pictures/1000000000000780000004387DAA6C31.png" xlink:type="simple" xlink:show="embed" xlink:actuate="onLoad" draw:mime-type="image/png"/></draw:frame><text:soft-page-break/></text:p>
      <text:h text:style-name="P20" text:outline-level="1"><text:bookmark-start text:name="__RefHeading___Toc1247_2026174545"/><text:soft-page-break/>Week 3: Stream Ciphers and Randomness Testing<text:bookmark-end text:name="__RefHeading___Toc1247_2026174545"/></text:h>
      <text:h text:style-name="P21" text:outline-level="2"><text:bookmark-start text:name="__RefHeading___Toc1249_2026174545"/>Fig 3: LFSR Implementation, RC4 Stream Cipher, and Performance Results<text:bookmark-end text:name="__RefHeading___Toc1249_2026174545"/></text:h>
      <text:h text:style-name="P14" text:outline-level="2"/>
      <text:p text:style-name="P19" loext:marker-style-name="T2"><draw:frame draw:style-name="fr1" draw:name="Image10" text:anchor-type="char" svg:x="0in" svg:y="-0.1417in" svg:width="6.9252in" svg:height="3.5665in" draw:z-index="9"><draw:image xlink:href="Pictures/100000000000078000000438EFBCE59D.png" xlink:type="simple" xlink:show="embed" xlink:actuate="onLoad" draw:mime-type="image/png"/></draw:frame><draw:frame draw:style-name="fr2" draw:name="Frame1" text:anchor-type="as-char" draw:z-index="14"><draw:text-box fo:min-height="0in" fo:min-width="0in"><text:h text:style-name="P10" text:outline-level="1"><text:bookmark-start text:name="__RefHeading___Toc1219_2026174545"/>Week 4: AES Block Cipher<text:bookmark-end text:name="__RefHeading___Toc1219_2026174545"/></text:h></draw:text-box></draw:frame><text:s/></text:p>
      <text:h text:style-name="P14" text:outline-level="2"><text:bookmark-start text:name="__RefHeading___Toc1251_2026174545"/>Fig 4: AES-256-CBC Key Generation, Encryption/Decryption, Performance Test, and Security Fe<draw:frame draw:style-name="fr1" draw:name="Image11" text:anchor-type="char" svg:x="0.1874in" svg:y="0.6146in" svg:width="6.9252in" svg:height="3.4665in" draw:z-index="10"><draw:image xlink:href="Pictures/100000000000078000000438AAF9BFBB.png" xlink:type="simple" xlink:show="embed" xlink:actuate="onLoad" draw:mime-type="image/png"/></draw:frame>atures<text:bookmark-end text:name="__RefHeading___Toc1251_2026174545"/></text:h>
      <text:p text:style-name="P19" loext:marker-style-name="T2"/>
      <text:h text:style-name="P20" text:outline-level="1"><text:bookmark-start text:name="__RefHeading___Toc1253_2026174545"/><text:soft-page-break/>Week 5: RSA Public Key Cryptography<text:bookmark-end text:name="__RefHeading___Toc1253_2026174545"/></text:h>
      <text:h text:style-name="P14" text:outline-level="2"><text:bookmark-start text:name="__RefHeading___Toc1255_2026174545"/>Fig 5: RSA-2048 Key Pair Generation, Public Key Encryption, Private Key Decryption, and Security Comparison<text:bookmark-end text:name="__RefHeading___Toc1255_2026174545"/></text:h>
      <text:p text:style-name="P19" loext:marker-style-name="T2"><draw:frame draw:style-name="fr1" draw:name="Image12" text:anchor-type="char" svg:x="0in" svg:y="-0.1417in" svg:width="6.9252in" svg:height="3.8953in" draw:z-index="11"><draw:image xlink:href="Pictures/10000000000007800000043852CF29A9.png" xlink:type="simple" xlink:show="embed" xlink:actuate="onLoad" draw:mime-type="image/png"/></draw:frame></text:p>
      <text:h text:style-name="P20" text:outline-level="1"><text:bookmark-start text:name="__RefHeading___Toc1257_2026174545"/>Week 6: Hashing and Password Security<text:bookmark-end text:name="__RefHeading___Toc1257_2026174545"/></text:h>
      <text:h text:style-name="P14" text:outline-level="2"><text:bookmark-start text:name="__RefHeading___Toc1259_2026174545"/>Fig 6: SHA-256 Hash Generation, PBKDF2 Password Hashing with Salt, Login Authentication, and Security Analysis<text:bookmark-end text:name="__RefHeading___Toc1259_2026174545"/></text:h>
      <text:p text:style-name="P19" loext:marker-style-name="T2"><draw:frame draw:style-name="fr1" draw:name="Image13" text:anchor-type="char" svg:x="-0.0311in" svg:y="-0.0457in" svg:width="6.9252in" svg:height="2.7075in" draw:z-index="12"><draw:image xlink:href="Pictures/1000000000000780000004384D3A8568.png" xlink:type="simple" xlink:show="embed" xlink:actuate="onLoad" draw:mime-type="image/png"/></draw:frame></text:p>
      <text:h text:style-name="P20" text:outline-level="1"><text:bookmark-start text:name="__RefHeading___Toc1261_2026174545"/><text:soft-page-break/>Creativity<text:bookmark-end text:name="__RefHeading___Toc1261_2026174545"/></text:h>
      <text:p text:style-name="P22" loext:marker-style-name="T2"><draw:frame draw:style-name="fr3" draw:name="Image14" text:anchor-type="char" svg:width="6.9252in" svg:height="3.8953in" draw:z-index="13"><draw:image xlink:href="Pictures/1000000000000780000004389ECFDE1B.png" xlink:type="simple" xlink:show="embed" xlink:actuate="onLoad" draw:mime-type="image/png"/></draw:frame></text:p>
      <text:p text:style-name="P19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7T22:53:16.365418162</meta:creation-date>
    <dc:date>2026-06-08T02:59:15.760063148</dc:date>
    <meta:editing-duration>PT8M16S</meta:editing-duration>
    <meta:editing-cycles>1</meta:editing-cycles>
    <meta:document-statistic meta:table-count="0" meta:image-count="14" meta:object-count="0" meta:page-count="11" meta:paragraph-count="55" meta:word-count="393" meta:character-count="2675" meta:non-whitespace-character-count="2334"/>
    <meta:generator>LibreOffice/26.2.3.2$Linux_X86_64 LibreOffice_project/620$Build-2</meta:generator>
  </office:meta>
</office:document-meta>
</file>